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92285"/>
    </style:style>
    <style:style style:name="P2" style:family="paragraph" style:parent-style-name="Heading_20_1">
      <style:paragraph-properties fo:margin-top="0.847cm" fo:margin-bottom="0cm" style:contextual-spacing="false" fo:keep-together="always" fo:keep-with-next="always"/>
      <style:text-properties officeooo:paragraph-rsid="00192285"/>
    </style:style>
    <style:style style:name="P3" style:family="paragraph" style:parent-style-name="Heading_20_1">
      <style:paragraph-properties fo:margin-top="0.847cm" fo:margin-bottom="0cm" style:contextual-spacing="false"/>
      <style:text-properties officeooo:paragraph-rsid="00192285"/>
    </style:style>
    <style:style style:name="P4" style:family="paragraph" style:parent-style-name="Standard">
      <style:text-properties officeooo:paragraph-rsid="00192285"/>
    </style:style>
    <style:style style:name="P5" style:family="paragraph" style:parent-style-name="Horizontal_20_Line">
      <style:text-properties officeooo:paragraph-rsid="00192285"/>
    </style:style>
    <style:style style:name="P6" style:family="paragraph" style:parent-style-name="Heading_20_2">
      <style:paragraph-properties fo:margin-top="0.353cm" fo:margin-bottom="0.499cm" style:contextual-spacing="fals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Horizontal_20_Line">
      <style:text-properties officeooo:paragraph-rsid="001b0961"/>
    </style:style>
    <style:style style:name="P11" style:family="paragraph" style:parent-style-name="Text_20_body">
      <style:text-properties officeooo:paragraph-rsid="001b0961"/>
    </style:style>
    <style:style style:name="P12" style:family="paragraph" style:parent-style-name="Heading_20_1">
      <style:paragraph-properties fo:break-before="page"/>
      <style:text-properties officeooo:paragraph-rsid="001b0961"/>
    </style:style>
    <style:style style:name="P13" style:family="paragraph" style:parent-style-name="Text_20_body">
      <style:text-properties officeooo:rsid="001ceb5c" officeooo:paragraph-rsid="001ceb5c"/>
    </style:style>
    <style:style style:name="P14" style:family="paragraph" style:parent-style-name="Horizontal_20_Line">
      <style:paragraph-properties fo:margin-top="0cm" fo:margin-bottom="0.247cm" style:contextual-spacing="false" fo:line-height="115%"/>
    </style:style>
    <style:style style:name="P15" style:family="paragraph" style:parent-style-name="Heading_20_3">
      <style:paragraph-properties fo:margin-top="0cm" fo:margin-bottom="0.247cm" style:contextual-spacing="false" fo:line-height="115%"/>
    </style:style>
    <style:style style:name="P16" style:family="paragraph" style:parent-style-name="Text_20_body" style:list-style-name="L4"/>
    <style:style style:name="P17" style:family="paragraph" style:parent-style-name="Quotations">
      <style:paragraph-properties fo:margin-top="0cm" fo:margin-bottom="0.247cm" style:contextual-spacing="false" fo:line-height="115%"/>
    </style:style>
    <style:style style:name="P18" style:family="paragraph" style:parent-style-name="Text_20_body">
      <style:text-properties fo:font-style="italic"/>
    </style:style>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6">
      <style:text-properties fo:font-style="italic"/>
    </style:style>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Heading_20_1">
      <style:paragraph-properties fo:margin-top="0cm" fo:margin-bottom="0.247cm" style:contextual-spacing="false" fo:line-height="115%" fo:break-before="page"/>
    </style:style>
    <style:style style:name="P26" style:family="paragraph" style:parent-style-name="Text_20_body" style:list-style-name="L10"/>
    <style:style style:name="P27" style:family="paragraph" style:parent-style-name="Text_20_body" style:list-style-name="L10">
      <style:text-properties fo:font-weight="bold"/>
    </style:style>
    <style:style style:name="P28" style:family="paragraph" style:parent-style-name="Text_20_body" style:list-style-name="L10">
      <style:text-properties fo:font-style="italic"/>
    </style:style>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2">
      <style:text-properties fo:font-style="italic"/>
    </style:style>
    <style:style style:name="P32" style:family="paragraph" style:parent-style-name="Text_20_body" style:list-style-name="L13"/>
    <style:style style:name="P33" style:family="paragraph" style:parent-style-name="Text_20_body" style:list-style-name="L13">
      <style:text-properties fo:font-style="italic"/>
    </style:style>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5">
      <style:paragraph-properties fo:margin-left="0cm" fo:margin-right="0cm" fo:text-indent="0cm" style:auto-text-indent="false"/>
    </style:style>
    <style:style style:name="T1" style:family="text">
      <style:text-properties officeooo:rsid="00192285"/>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weight="bold"/>
    </style:style>
    <style:style style:name="T5" style:family="text">
      <style:text-properties officeooo:rsid="001ceb5c"/>
    </style:style>
    <style:style style:name="T6" style:family="text">
      <style:text-properties fo:font-weight="bold" officeooo:rsid="001ceb5c"/>
    </style:style>
    <style:style style:name="T7" style:family="text">
      <style:text-properties officeooo:rsid="001e29b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Fiche Élève – <text:span text:style-name="Emphasis">L</text:span><text:span text:style-name="Emphasis"><text:span text:style-name="T1">e modeleur voumique</text:span></text:span><text:span text:style-name="Emphasis"> , un outils pour innover ?</text:span></text:p>
      <text:h text:style-name="P2" text:outline-level="1"><text:span text:style-name="Strong_20_Emphasis"><text:span text:style-name="T2">Lycée Bellevue – SI-CIT</text:span></text:span></text:h>
      <text:h text:style-name="P3" text:outline-level="1">Séquence SI-CIT — Concevoir un objet innovant avec l’IA</text:h>
      <text:p text:style-name="P4">Durée : <text:span text:style-name="T1">4</text:span> séances de 1h30<text:line-break/>Niveau : Seconde (option SI-CIT)<text:line-break/>Thématique : Création et Innovation Technologiques – <text:span text:style-name="T3">Vers une conception responsable.</text:span> </text:p>
      <text:p text:style-name="P5"/>
      <text:h text:style-name="P6" text:outline-level="2">1. Introduction et Problématique</text:h>
      <text:p text:style-name="Text_20_body">Dans un monde où les ressources naturelles sont limitées, l’ingénieur et le designer d’aujourd’hui ne se contentent plus de créer des objets fonctionnels ; ils doivent concevoir des solutions <text:span text:style-name="T4">durables</text:span>.</text:p>
      <text:p text:style-name="Text_20_body">L'innovation technologique passe désormais par la maîtrise du <text:span text:style-name="T4">Jumeau Numérique</text:span>. Grâce à la CAO (Conception Assistée par Ordinateur) paramétrique, nous pouvons optimiser la quantité de matière utilisée, tester la résistance d'un objet avant même sa fabrication et ainsi réduire l'empreinte environnementale liée aux prototypes physiques inutiles.</text:p>
      <text:p text:style-name="Text_20_body"><text:span text:style-name="T4">Problématique :</text:span> <text:span text:style-name="T3">Comment un modeleur volumique permet-il de passer d'une idée créative à un prototype numérique précis, optimisé pour la préservation de notre environnement ?</text:span></text:p>
      <text:p text:style-name="Horizontal_20_Line"/>
      <text:h text:style-name="P6" text:outline-level="2">2. Objectifs Pédagogiques (Référentiel CIT)</text:h>
      <text:p text:style-name="Text_20_body">En lien avec le programme officiel, cette séquence vise à développer les compétences suivantes :</text:p>
      <text:list text:style-name="L1">
        <text:list-item>
          <text:p text:style-name="P7"><text:span text:style-name="T4">Analyser l'existant :</text:span> Comprendre comment l'évolution des outils de conception (du dessin technique à la CAO Cloud) a permis d'accélérer l'innovation durable.</text:p>
        </text:list-item>
        <text:list-item>
          <text:p text:style-name="P7"><text:span text:style-name="T4">Expérimenter et Créer :</text:span> Utiliser un outil numérique (Onshape) pour traduire une intention de design en une forme géométrique précise.</text:p>
        </text:list-item>
        <text:list-item>
          <text:p text:style-name="P7"><text:span text:style-name="T4">Démarche de créativité :</text:span> Appliquer des contraintes dimensionnelles et géométriques pour rendre l'objet adaptable et évolutif (principe de la conception paramétrique).</text:p>
        </text:list-item>
        <text:list-item>
          <text:p text:style-name="P7"><text:span text:style-name="T4">Éco-conception :</text:span> Appréhender la relation entre la géométrie d'une pièce, le choix du matériau et son impact environnemental (optimisation de forme).</text:p>
        </text:list-item>
      </text:list>
      <text:p text:style-name="Horizontal_20_Line"/>
      <text:h text:style-name="P6" text:outline-level="2">3. Contenu de la Formatio<text:span text:style-name="T5">n </text:span><text:span text:style-name="T4">L’histoire et l’évolution de la CAO</text:span></text:h>
      <text:p text:style-name="Text_20_body">Les élèves suivront un parcours structuré autour de quatre piliers :</text:p>
      <text:list text:style-name="L2">
        <text:list-item>
          <text:p text:style-name="P8"><text:span text:style-name="T6">Histoire de la CAO</text:span><text:span text:style-name="T4"> :</text:span> Comprendre le passage de la planche à dessin au paramétrique.</text:p>
          <text:p text:style-name="P8"><text:a xlink:type="simple" xlink:href="https://blogs.solidworks.com/solidworksfrance/2024/10/lhistoire-de-la-cao-de-la-planche-a-dessin-a-la-revolution-numerique.html" text:style-name="Internet_20_link" text:visited-style-name="Visited_20_Internet_20_Link"><text:soft-page-break/>https://blogs.solidworks.com/solidworksfrance/2024/10/lhistoire-de-la-cao-de-la-planche-a-dessin-a-la-revolution-numerique.html</text:a> </text:p>
        </text:list-item>
        <text:list-item>
          <text:p text:style-name="P8"><text:span text:style-name="T4">L’interface et la navigation :</text:span> Maîtriser l'espace de travail 3D.</text:p>
        </text:list-item>
        <text:list-item>
          <text:p text:style-name="P8"><text:span text:style-name="T4">L'esquisse <text:s/>:</text:span> Apprendre à dessiner avec des contraintes (l'intelligence du trait).</text:p>
        </text:list-item>
        <text:list-item>
          <text:p text:style-name="P8"><text:span text:style-name="T4">La modélisation :</text:span> Transformer des formes 2D en volumes 3D (extrusion, révolution) pour créer des composants réels.</text:p>
        </text:list-item>
      </text:list>
      <text:p text:style-name="Horizontal_20_Line"/>
      <text:h text:style-name="P6" text:outline-level="2">4. Lien avec la préservation de l'environnement</text:h>
      <text:p text:style-name="Text_20_body">L'accent sera mis sur le fait que <text:span text:style-name="T4">"mieux concevoir, c'est moins polluer"</text:span>.</text:p>
      <text:list text:style-name="L3">
        <text:list-item>
          <text:p text:style-name="P9"><text:span text:style-name="T4">Réduction des déchets :</text:span> En simulant parfaitement l'assemblage numériquement, on évite les erreurs de fabrication et le gaspillage de plastique ou de métal.</text:p>
        </text:list-item>
        <text:list-item>
          <text:p text:style-name="P9"><text:span text:style-name="T4">Réparabilité :</text:span> Apprendre à modéliser des pièces de rechange pour prolonger la durée de vie des objets (lutte contre l'obsolescence).</text:p>
        </text:list-item>
      </text:list>
      <text:p text:style-name="P10"/>
      <text:p text:style-name="P11"/>
      <text:h text:style-name="P12" text:outline-level="1">🎓 TP 1 : Mon Premier Objet Connecté (au Cloud)</text:h>
      <text:p text:style-name="Text_20_body"><text:span text:style-name="T4">Lycée Bellevue — SI-CIT</text:span> <text:span text:style-name="T4">Objectif :</text:span> Maîtriser les 3 étapes clés de la CAO : Esquisse ➔ Cotes ➔ Volume.</text:p>
      <text:p text:style-name="P13">Lire l’<text:span text:style-name="T4">Histoire de la CAO :</text:span> Comprendre le passage de la planche à dessin au paramétrique.</text:p>
      <text:p text:style-name="P13"><text:a xlink:type="simple" xlink:href="https://blogs.solidworks.com/solidworksfrance/2024/10/lhistoire-de-la-cao-de-la-planche-a-dessin-a-la-revolution-numerique.html" text:style-name="Internet_20_link" text:visited-style-name="Visited_20_Internet_20_Link">https://blogs.solidworks.com/solidworksfrance/2024/10/lhistoire-de-la-cao-de-la-planche-a-dessin-a-la-revolution-numerique.html</text:a> </text:p>
      <text:p text:style-name="P14"/>
      <text:h text:style-name="P15" text:outline-level="3">1. Préparation de l'espace de travail</text:h>
      <text:list text:style-name="L4">
        <text:list-item>
          <text:p text:style-name="P16">Connectez-vous sur <text:a xlink:type="simple" xlink:href="https://cad.onshape.com/" office:target-frame-name="_blank" xlink:show="new" text:style-name="Internet_20_link" text:visited-style-name="Visited_20_Internet_20_Link">cad.onshape.com</text:a>.</text:p>
        </text:list-item>
        <text:list-item>
          <text:p text:style-name="P16">Cliquez sur le bouton bleu <text:span text:style-name="T4">Créer</text:span> (Create) &gt; <text:span text:style-name="T4">Document</text:span>.</text:p>
        </text:list-item>
        <text:list-item>
          <text:p text:style-name="P16">Nommez le document exactement ainsi : <text:span text:style-name="Source_20_Text">NOM_Prénom_TP1</text:span> (ex: <text:span text:style-name="T3">DUPONT_Thomas_TP1</text:span>).</text:p>
        </text:list-item>
        <text:list-item>
          <text:p text:style-name="P16">Validez. Vous arrivez dans l'espace 3D.</text:p>
        </text:list-item>
      </text:list>
      <text:p text:style-name="P17">💡 <text:span text:style-name="T4">L'astuce du pro :</text:span> Vérifiez que vos unités sont bien en <text:span text:style-name="T4">Millimètres</text:span>. <text:span text:style-name="T3">(Menu "Hamburger" ≡ en haut à gauche &gt; Workspace Units &gt; Default length unit : Millimeter)</text:span></text:p>
      <text:p text:style-name="P14"/>
      <text:h text:style-name="P15" text:outline-level="3">2. L'Esquisse (Le dessin 2D)</text:h>
      <text:p text:style-name="P18">Pour créer un volume, il faut d'abord dessiner un profil à plat.</text:p>
      <text:list text:style-name="L5">
        <text:list-item>
          <text:p text:style-name="P19">Cliquez sur le bouton <text:span text:style-name="T4">Esquisse</text:span> (Sketch) [Icône Crayon] en haut à gauche.</text:p>
        </text:list-item>
        <text:list-item>
          <text:p text:style-name="P19">Le logiciel vous demande "Où dessiner ?". Cliquez sur le plan <text:span text:style-name="T4">Top</text:span> (Dessus) au centre de l'écran.</text:p>
        </text:list-item>
        <text:list-item>
          <text:p text:style-name="P19">Pour voir votre feuille bien à plat : Appuyez sur la touche <text:span text:style-name="T4">N</text:span> de votre clavier (Normal View).</text:p>
        </text:list-item>
        <text:list-item>
          <text:p text:style-name="P19">Choisissez l'outil <text:span text:style-name="T4">Rectangle par centre</text:span> (Center point rectangle).</text:p>
        </text:list-item>
        <text:list-item>
          <text:p text:style-name="P19">Cliquez sur l'origine (le point noir au centre) et écartez la souris. Cliquez pour valider la forme (peu importe la taille pour l'instant).</text:p>
        </text:list-item>
      </text:list>
      <text:p text:style-name="P14"/>
      <text:h text:style-name="P15" text:outline-level="3">3. Les Cotes (La précision ingénieur)</text:h>
      <text:p text:style-name="P18">En SI, on ne dessine pas "au hasard". On dimensionne.</text:p>
      <text:list text:style-name="L6">
        <text:list-item>
          <text:p text:style-name="P20">Cliquez sur l'outil <text:span text:style-name="T4">Cote</text:span> (Dimension) [Icône avec deux flèches] ou appuyez sur la touche <text:span text:style-name="T4">D</text:span>.</text:p>
        </text:list-item>
        <text:list-item>
          <text:p text:style-name="P20">Cliquez sur la ligne du haut du rectangle.</text:p>
        </text:list-item>
        <text:list-item>
          <text:p text:style-name="P20">Entrez la valeur : <text:span text:style-name="T4">60</text:span> (puis Entrée).</text:p>
        </text:list-item>
        <text:list-item>
          <text:p text:style-name="P20">Cliquez sur la ligne de côté.</text:p>
        </text:list-item>
        <text:list-item>
          <text:p text:style-name="P20">Entrez la valeur : <text:span text:style-name="T4">30</text:span> (puis Entrée).</text:p>
          <text:list>
            <text:list-item>
              <text:p text:style-name="P21"><text:soft-page-break/>Votre rectangle doit devenir NOIR. Cela signifie qu'il est totalement contraint (fixé).</text:p>
            </text:list-item>
          </text:list>
        </text:list-item>
        <text:list-item>
          <text:p text:style-name="P20">Validez l'esquisse en cliquant sur la <text:span text:style-name="T4">Coche Verte</text:span> ✅.</text:p>
        </text:list-item>
      </text:list>
      <text:p text:style-name="P14"/>
      <text:h text:style-name="P15" text:outline-level="3">4. Le Volume (L'extrusion)</text:h>
      <text:list text:style-name="L7">
        <text:list-item>
          <text:p text:style-name="P22">Passez en vue 3D (Iso) pour mieux voir : Cliquez sur le petit coin du cube de navigation en haut à droite.</text:p>
        </text:list-item>
        <text:list-item>
          <text:p text:style-name="P22">Cliquez sur le bouton <text:span text:style-name="T4">Extrusion</text:span> (Extrude) [Icône Cube qui grandit].</text:p>
        </text:list-item>
        <text:list-item>
          <text:p text:style-name="P22">Sélectionnez votre rectangle (cliquez à l'intérieur).</text:p>
        </text:list-item>
        <text:list-item>
          <text:p text:style-name="P22">Dans la petite fenêtre, réglez la <text:span text:style-name="T4">Profondeur</text:span> (Depth) à <text:span text:style-name="T4">5 mm</text:span>.</text:p>
        </text:list-item>
        <text:list-item>
          <text:p text:style-name="P22">Validez ✅.</text:p>
        </text:list-item>
      </text:list>
      <text:p text:style-name="P14"/>
      <text:h text:style-name="P15" text:outline-level="3">5. L'enlèvement de matière (Le trou du porte-clés)</text:h>
      <text:p text:style-name="P18">On peut ajouter de la matière, mais aussi en enlever (percer).</text:p>
      <text:list text:style-name="L8">
        <text:list-item>
          <text:p text:style-name="P23">Faites un <text:span text:style-name="T4">Clic Droit</text:span> sur la face du dessus de votre bloc &gt; <text:span text:style-name="T4">Nouvelle Esquisse</text:span> (New Sketch).</text:p>
        </text:list-item>
        <text:list-item>
          <text:p text:style-name="P23">Appuyez sur <text:span text:style-name="T4">N</text:span> pour remettre la vue à plat.</text:p>
        </text:list-item>
        <text:list-item>
          <text:p text:style-name="P23">Prenez l'outil <text:span text:style-name="T4">Cercle</text:span> (Center point circle). Dessinez un cercle quelque part sur la pièce <text:span text:style-name="T7">mais sans prendre un point particulier déjà présent</text:span>.</text:p>
        </text:list-item>
        <text:list-item>
          <text:p text:style-name="P23">Avec l'outil <text:span text:style-name="T4">Cote (D)</text:span>, réglez :</text:p>
          <text:list>
            <text:list-item>
              <text:p text:style-name="P23">Le diamètre du cercle : <text:span text:style-name="T4">5 mm</text:span>.</text:p>
            </text:list-item>
            <text:list-item>
              <text:p text:style-name="P23">La distance entre le centre du cercle et le bord gauche : <text:span text:style-name="T4">5 mm</text:span>.</text:p>
            </text:list-item>
            <text:list-item>
              <text:p text:style-name="P23">La distance entre le centre et le bord haut : <text:span text:style-name="T4">15 mm</text:span> (pour être centré).</text:p>
            </text:list-item>
          </text:list>
        </text:list-item>
        <text:list-item>
          <text:p text:style-name="P23">Validez l'esquisse ✅.</text:p>
        </text:list-item>
        <text:list-item>
          <text:p text:style-name="P23">Cliquez sur <text:span text:style-name="T4">Extrusion</text:span>.</text:p>
        </text:list-item>
        <text:list-item>
          <text:p text:style-name="P23"><text:span text:style-name="T4">ATTENTION :</text:span> Dans la fenêtre, cliquez sur l'onglet <text:span text:style-name="T4">Supprimer</text:span> (Remove).</text:p>
        </text:list-item>
        <text:list-item>
          <text:p text:style-name="P23">Sélectionnez le cercle. Il doit creuser la pièce. Validez ✅.</text:p>
        </text:list-item>
      </text:list>
      <text:p text:style-name="P14"/>
      <text:h text:style-name="P15" text:outline-level="3">🧱 Défi Bonus : Personnalisation &amp; Éco-conception</text:h>
      <text:p text:style-name="Text_20_body">Vous avez fini ? Bravo ! Maintenant, personnalisez votre objet :</text:p>
      <text:list text:style-name="L9">
        <text:list-item>
          <text:p text:style-name="P24"><text:span text:style-name="T4">Arrondir les angles :</text:span> Utilisez l'outil <text:span text:style-name="T4">Congé</text:span> (Fillet) [Icône coin rond] pour adoucir les arêtes vives (Rayon conseillé : 2 mm).</text:p>
        </text:list-item>
        <text:list-item>
          <text:p text:style-name="P24"><text:span text:style-name="T4">Graver votre prénom :</text:span> Créez une esquisse sur le dessus, utilisez l'outil <text:span text:style-name="T4">Texte</text:span>, puis faites une Extrusion en mode <text:span text:style-name="T4">Supprimer</text:span> (profondeur 0.5 mm seulement !).</text:p>
        </text:list-item>
        <text:list-item>
          <text:p text:style-name="P24"><text:span text:style-name="T4">Question Réflexion :</text:span> Si on devait fabriquer 10 000 porte-clés, comment modifier l'esquisse initiale pour utiliser moins de plastique tout en gardant la même forme extérieure ?</text:p>
        </text:list-item>
      </text:list>
      <text:p text:style-name="P14"><text:soft-page-break/></text:p>
      <text:p text:style-name="Text_20_body"><text:span text:style-name="T4">Une fois terminé :</text:span> Le professeur a accès à votre travail automatiquement via la "Team". <text:span text:style-name="T4">Note :</text:span> N'oubliez pas de vous déconnecter en fin de séance.</text:p>
      <text:h text:style-name="P25" text:outline-level="1">🌊 TP 2 : Le Caisson Étanche (Capteur Océan)</text:h>
      <text:p text:style-name="Text_20_body"><text:span text:style-name="T4">Lycée Bellevue — SI-CIT</text:span> <text:span text:style-name="T4">Objectif :</text:span> Créer des formes cylindriques et creuses complexes sans empiler des cercles. <text:span text:style-name="T4">Nouveaux Outils :</text:span> Révolution (Revolve), Coque (Shell), Rayon (Fillet).</text:p>
      <text:p text:style-name="P14"/>
      <text:h text:style-name="P15" text:outline-level="3">1. Le Scénario</text:h>
      <text:p text:style-name="Text_20_body">Pour surveiller la qualité de l'eau, nous devons protéger nos capteurs électroniques (Arduino/Micro:bit) de l'eau salée et de la pression. Vous allez concevoir le <text:span text:style-name="T4">corps principal</text:span> d'une bouée submersible.</text:p>
      <text:p text:style-name="Text_20_body"><text:span text:style-name="T4">Pourquoi ne pas faire une extrusion ?</text:span> Une extrusion crée un volume "droit". Une <text:span text:style-name="T4">Révolution</text:span> permet de créer des formes arrondies, bombées ou avec des gorges (pour les joints d'étanchéité) en une seule opération.</text:p>
      <text:p text:style-name="P14"/>
      <text:h text:style-name="P15" text:outline-level="3">2. L'Esquisse : Penser "Demi-Profil"</text:h>
      <text:p text:style-name="P18">En révolution, on ne dessine que la moitié de la pièce.</text:p>
      <text:list text:style-name="L10">
        <text:list-item>
          <text:p text:style-name="P26">Créez un document : <text:span text:style-name="Source_20_Text">NOM_Caisson_TP2</text:span>.</text:p>
        </text:list-item>
        <text:list-item>
          <text:p text:style-name="P26">Créez une <text:span text:style-name="T4">Esquisse</text:span> sur le plan <text:span text:style-name="T4">Front</text:span> (Face). Appuyez sur <text:span text:style-name="T4">N</text:span>.</text:p>
        </text:list-item>
        <text:list-item>
          <text:p text:style-name="P27">L'Axe de rotation (Crucial) :</text:p>
          <text:list>
            <text:list-item>
              <text:p text:style-name="P26">Sélectionnez l'outil <text:span text:style-name="T4">Ligne</text:span> (Line) <text:span text:style-name="T4">ET</text:span> l'outil <text:span text:style-name="T4">Construction</text:span> [Icône ligne pointillée].</text:p>
            </text:list-item>
            <text:list-item>
              <text:p text:style-name="P26">Tracez une ligne verticale partant de l'origine vers le haut. (Longueur environ 100mm, peu importe).</text:p>
            </text:list-item>
            <text:list-item>
              <text:p text:style-name="P28">Désactivez l'outil Construction.</text:p>
            </text:list-item>
          </text:list>
        </text:list-item>
        <text:list-item>
          <text:p text:style-name="P27">Le Profil :</text:p>
          <text:list>
            <text:list-item>
              <text:p text:style-name="P26">Avec l'outil <text:span text:style-name="T4">Ligne</text:span> (classique), dessinez un <text:span text:style-name="T4">Rectangle</text:span> collé à droite de votre axe.</text:p>
            </text:list-item>
            <text:list-item>
              <text:p text:style-name="P26">Le rectangle doit toucher l'axe de construction sur un côté.</text:p>
            </text:list-item>
          </text:list>
        </text:list-item>
        <text:list-item>
          <text:p text:style-name="P27">Les Cotes (Dimension) :</text:p>
          <text:list>
            <text:list-item>
              <text:p text:style-name="P26">Hauteur du rectangle : <text:span text:style-name="T4">120 mm</text:span>.</text:p>
            </text:list-item>
            <text:list-item>
              <text:p text:style-name="P26">Largeur (Rayon) : <text:span text:style-name="T4">40 mm</text:span>.</text:p>
            </text:list-item>
            <text:list-item>
              <text:p text:style-name="P26"><text:span text:style-name="T3">L'esquisse doit être noire.</text:span> Validez ✅.</text:p>
            </text:list-item>
          </text:list>
        </text:list-item>
      </text:list>
      <text:p text:style-name="P14"/>
      <text:h text:style-name="P15" text:outline-level="3">3. La Révolution (La magie opère)</text:h>
      <text:list text:style-name="L11">
        <text:list-item>
          <text:p text:style-name="P29">Passez en vue 3D (Iso).</text:p>
        </text:list-item>
        <text:list-item>
          <text:p text:style-name="P29">Cliquez sur l'outil <text:span text:style-name="T4">Révolution</text:span> (Revolve) [Icône coupe de gâteau].</text:p>
        </text:list-item>
        <text:list-item>
          <text:p text:style-name="P29">La fenêtre vous demande deux choses :</text:p>
          <text:list>
            <text:list-item>
              <text:p text:style-name="P29"><text:span text:style-name="T4">Faces to revolve (Faces à tourner) :</text:span> Cliquez sur votre rectangle.</text:p>
            </text:list-item>
            <text:list-item>
              <text:p text:style-name="P29"><text:soft-page-break/><text:span text:style-name="T4">Revolve Axis (Axe de révolution) :</text:span> Cliquez sur la case rouge dans la fenêtre, puis cliquez sur votre ligne pointillée verticale.</text:p>
            </text:list-item>
          </text:list>
        </text:list-item>
        <text:list-item>
          <text:p text:style-name="P29">Vous obtenez un cylindre parfait. Validez ✅.</text:p>
        </text:list-item>
      </text:list>
      <text:p text:style-name="P14"/>
      <text:h text:style-name="P15" text:outline-level="3">4. L'Aérodynamisme (Hydrodynamisme)</text:h>
      <text:p text:style-name="Text_20_body">Un cylindre plat freine dans l'eau. Arrondissons le fond.</text:p>
      <text:list text:style-name="L12">
        <text:list-item>
          <text:p text:style-name="P30">Utilisez l'outil <text:span text:style-name="T4">Congé</text:span> (Fillet) [Icône coin rond].</text:p>
        </text:list-item>
        <text:list-item>
          <text:p text:style-name="P30">Sélectionnez l'arête (le bord) du <text:span text:style-name="T4">bas</text:span> du cylindre.</text:p>
        </text:list-item>
        <text:list-item>
          <text:p text:style-name="P30">Entrez un rayon de <text:span text:style-name="T4">40 mm</text:span> (le même que la largeur).</text:p>
          <text:list>
            <text:list-item>
              <text:p text:style-name="P31">Observez : Le fond devient une demi-sphère parfaite.</text:p>
            </text:list-item>
          </text:list>
        </text:list-item>
        <text:list-item>
          <text:p text:style-name="P30">Validez ✅.</text:p>
        </text:list-item>
      </text:list>
      <text:p text:style-name="P14"/>
      <text:h text:style-name="P15" text:outline-level="3">5. Faire le vide : La Coque (Shell)</text:h>
      <text:p text:style-name="Text_20_body">Plutôt que de "percer" l'intérieur, nous allons demander à Onshape de vider la pièce en laissant une épaisseur constante (comme une bouteille).</text:p>
      <text:list text:style-name="L13">
        <text:list-item>
          <text:p text:style-name="P32">Cliquez sur l'outil <text:span text:style-name="T4">Coque</text:span> (Shell) [Icône cube vide].</text:p>
        </text:list-item>
        <text:list-item>
          <text:p text:style-name="P32"><text:span text:style-name="T4">Faces to remove (Faces à supprimer) :</text:span> Cliquez sur la face plate du <text:span text:style-name="T4">Haut</text:span>.</text:p>
        </text:list-item>
        <text:list-item>
          <text:p text:style-name="P32"><text:span text:style-name="T4">Thickness (Épaisseur) :</text:span> Entrez <text:span text:style-name="T4">3 mm</text:span>.</text:p>
          <text:list>
            <text:list-item>
              <text:p text:style-name="P33">Onshape creuse automatiquement tout l'intérieur en laissant 3mm de paroi partout.</text:p>
            </text:list-item>
          </text:list>
        </text:list-item>
        <text:list-item>
          <text:p text:style-name="P32">Validez ✅.</text:p>
        </text:list-item>
      </text:list>
      <text:p text:style-name="P14"/>
      <text:h text:style-name="P15" text:outline-level="3">6. Le détail Pro : La gorge du joint torique</text:h>
      <text:p text:style-name="Text_20_body">Pour que le couvercle soit étanche, il faut un joint en caoutchouc (O-ring). Créons sa place.</text:p>
      <text:list text:style-name="L14">
        <text:list-item>
          <text:p text:style-name="P34">Créez une nouvelle <text:span text:style-name="T4">Esquisse</text:span> sur le plan <text:span text:style-name="T4">Front</text:span> (comme au début). <text:span text:style-name="T4">N</text:span>.</text:p>
        </text:list-item>
        <text:list-item>
          <text:p text:style-name="P34">Zoomez sur le haut de la paroi, à droite.</text:p>
        </text:list-item>
        <text:list-item>
          <text:p text:style-name="P34">Dessinez un petit <text:span text:style-name="T4">Cercle</text:span> qui "mord" dans la matière (sur le bord extérieur ou supérieur).</text:p>
        </text:list-item>
        <text:list-item>
          <text:p text:style-name="P34">Cotez ce cercle à <text:span text:style-name="T4">3 mm</text:span> de diamètre.</text:p>
        </text:list-item>
        <text:list-item>
          <text:p text:style-name="P34">Validez.</text:p>
        </text:list-item>
        <text:list-item>
          <text:p text:style-name="P34">Utilisez <text:span text:style-name="T4">Révolution</text:span>, mais cette fois dans l'onglet <text:span text:style-name="T4">Supprimer</text:span> (Remove).</text:p>
          <text:list>
            <text:list-item>
              <text:p text:style-name="P34"><text:span text:style-name="T3">Profil :</text:span> Le petit cercle.</text:p>
            </text:list-item>
            <text:list-item>
              <text:p text:style-name="P34"><text:span text:style-name="T3">Axe :</text:span> Toujours l'axe central du cylindre (vous devrez peut-être ré-afficher l'Esquisse 1 via le petit œil 👁️ dans l'arbre à gauche pour voir l'axe).</text:p>
            </text:list-item>
            <text:list-item>
              <text:p text:style-name="P34"><text:span text:style-name="T3">Résultat :</text:span> Une rainure circulaire parfaite tout autour de la pièce.</text:p>
            </text:list-item>
          </text:list>
        </text:list-item>
      </text:list>
      <text:p text:style-name="P14"/>
      <text:h text:style-name="P15" text:outline-level="3"><text:soft-page-break/>🧠 Défi SI-CIT : Matériaux et Masse</text:h>
      <text:p text:style-name="Text_20_body">Dans l'arbre de gauche, faites un clic-droit sur <text:span text:style-name="T4">Part 1</text:span> &gt; <text:span text:style-name="T4">Assign Material</text:span>.</text:p>
      <text:list text:style-name="L15">
        <text:list-item>
          <text:p text:style-name="P35">Cherchez <text:span text:style-name="T4">"ABS"</text:span> (plastique standard) et validez.</text:p>
        </text:list-item>
        <text:list-item>
          <text:p text:style-name="P35">Cliquez sur la petite balance (en bas à droite) pour afficher la masse.</text:p>
        </text:list-item>
        <text:list-item>
          <text:p text:style-name="P36"><text:span text:style-name="T4">Question :</text:span> La masse volumique de l'eau de mer est d'environ 1.025 g/cm3.</text:p>
          <text:list>
            <text:list-item>
              <text:p text:style-name="P36">Notez le <text:span text:style-name="T4">Volume</text:span> de votre pièce (en cm3 ou mm3).</text:p>
            </text:list-item>
            <text:list-item>
              <text:p text:style-name="P36">Calculez la masse d'eau déplacée si la pièce est totalement immergée (Poussée d'Archimède : Fa​=ρ⋅V⋅g).</text:p>
            </text:list-item>
            <text:list-item>
              <text:p text:style-name="P35">Cette pièce flottera-t-elle si on la pose sur l'eau (sans lest) ?</text:p>
            </text:list-item>
          </text:list>
        </text:list-item>
      </text:list>
      <text:p text:style-name="Text_20_body"/>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Standard" style:next-style-name="Standard"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NSimSun1" style:font-family-asian="NSimSun"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loext:char-complex-color loext:theme-type="accent1" loext:color-type="theme"/>
      </style:text-properties>
    </style:style>
    <style:style style:name="Heading_20_1" style:display-name="Heading 1" style:family="paragraph" style:parent-style-name="Standard" style:next-style-name="Standard"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18T11:38:36.617867600</meta:creation-date>
    <dc:date>2026-01-20T10:28:06.765954000</dc:date>
    <meta:editing-duration>PT56M3S</meta:editing-duration>
    <meta:editing-cycles>6</meta:editing-cycles>
    <meta:generator>LibreOffice/25.8.3.2$Windows_X86_64 LibreOffice_project/8ca8d55c161d602844f5428fa4b58097424e324e</meta:generator>
    <meta:document-statistic meta:table-count="0" meta:image-count="0" meta:object-count="0" meta:page-count="8" meta:paragraph-count="136" meta:word-count="1677" meta:character-count="10187" meta:non-whitespace-character-count="8716"/>
  </office:meta>
</office:document-meta>
</file>